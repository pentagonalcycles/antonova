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C4000002A662E2E23F.jpg" manifest:media-type="image/jpeg"/>
  <manifest:file-entry manifest:full-path="Pictures/10000000000001BB0000029847757E15.jpg" manifest:media-type="image/jpeg"/>
  <manifest:file-entry manifest:full-path="Pictures/10000000000001D6000002C2CE78E37F.jpg" manifest:media-type="image/jpeg"/>
  <manifest:file-entry manifest:full-path="Pictures/10000000000001F0000002E9718A55AA.jpg" manifest:media-type="image/jpeg"/>
  <manifest:file-entry manifest:full-path="Pictures/10000000000001E0000002D04D6086E9.jpg" manifest:media-type="image/jpeg"/>
  <manifest:file-entry manifest:full-path="Pictures/100000000000030000000200587A8974.png" manifest:media-type="image/png"/>
  <manifest:file-entry manifest:full-path="Pictures/10000000000001E0000002D0ED4A4C29.jpg" manifest:media-type="image/jpeg"/>
  <manifest:file-entry manifest:full-path="Pictures/100000000000014C0000014B63F37E7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rame_20_contents">
      <style:text-properties fo:color="#ffc000" loext:opacity="100%" style:font-name="Georgia" fo:font-size="18pt" fo:font-weight="bold" style:font-size-asian="18pt" style:font-weight-asian="bold" style:font-size-complex="18pt"/>
    </style:style>
    <style:style style:name="P2" style:family="paragraph">
      <loext:graphic-properties draw:fill="solid" draw:fill-color="#ffffff"/>
      <style:paragraph-properties fo:text-align="start"/>
      <style:text-properties fo:font-size="18pt"/>
    </style:style>
    <style:style style:name="P3" style:family="paragraph" style:parent-style-name="Standard">
      <style:paragraph-properties fo:text-align="justify" style:justify-single-word="false" loext:word-spacing-minimum="75%" loext:word-spacing-maximum="133%"/>
    </style:style>
    <style:style style:name="P4" style:family="paragraph" style:parent-style-name="Frame_20_contents">
      <style:paragraph-properties fo:text-align="center" style:justify-single-word="false"/>
      <style:text-properties fo:color="#001d35" loext:opacity="100%" style:font-name="Georgia" fo:font-size="14pt" fo:font-style="italic" fo:background-color="#ffffff" style:font-size-asian="14pt" style:font-style-asian="italic" style:font-name-complex="Arial" style:font-size-complex="14pt"/>
    </style:style>
    <style:style style:name="P5" style:family="paragraph" style:parent-style-name="Frame_20_contents">
      <style:paragraph-properties fo:margin-top="0in" fo:margin-bottom="0in" style:contextual-spacing="false" fo:text-align="center" style:justify-single-word="false"/>
    </style:style>
    <style:style style:name="P6" style:family="paragraph" style:parent-style-name="Frame_20_contents">
      <style:paragraph-properties fo:text-align="end" style:justify-single-word="false"/>
      <style:text-properties style:font-name="Georgia"/>
    </style:style>
    <style:style style:name="P7" style:family="paragraph" style:parent-style-name="Frame_20_contents">
      <style:paragraph-properties fo:text-align="end" style:justify-single-word="false"/>
    </style:style>
    <style:style style:name="P8" style:family="paragraph" style:parent-style-name="Standard">
      <style:text-properties style:font-name="Georgia"/>
    </style:style>
    <style:style style:name="P9" style:family="paragraph" style:parent-style-name="Standard">
      <style:paragraph-properties fo:margin-top="0in" fo:margin-bottom="0.111in" style:contextual-spacing="false" fo:break-before="page"/>
    </style:style>
    <style:style style:name="P10" style:family="paragraph" style:parent-style-name="Frame_20_contents">
      <style:text-properties style:font-name="Georgia" fo:font-size="14pt" fo:font-style="italic" fo:background-color="#ffffff" style:font-size-asian="14pt" style:font-style-asian="italic" style:font-name-complex="Arial" style:font-size-complex="14pt"/>
    </style:style>
    <style:style style:name="P11" style:family="paragraph" style:parent-style-name="Frame_20_contents">
      <style:paragraph-properties fo:text-align="center" style:justify-single-word="false"/>
    </style:style>
    <style:style style:name="P12" style:family="paragraph">
      <loext:graphic-properties draw:fill="none"/>
      <style:paragraph-properties fo:text-align="start"/>
      <style:text-properties fo:font-size="18pt"/>
    </style:style>
    <style:style style:name="P13" style:family="paragraph" style:parent-style-name="Normal_20__28_Web_29_">
      <style:paragraph-properties fo:margin-top="0.1945in" fo:margin-bottom="0.1945in" style:contextual-spacing="false"/>
    </style:style>
    <style:style style:name="P14" style:family="paragraph" style:parent-style-name="Frame_20_contents">
      <style:paragraph-properties fo:text-align="justify" style:justify-single-word="false" loext:word-spacing-minimum="75%" loext:word-spacing-maximum="133%"/>
    </style:style>
    <style:style style:name="P15" style:family="paragraph" style:parent-style-name="Frame_20_contents">
      <style:paragraph-properties fo:text-align="center" style:justify-single-word="false"/>
      <style:text-properties style:font-name="Georgia" fo:font-size="14pt" fo:font-style="italic" fo:background-color="#ffffff" style:font-size-asian="14pt" style:font-style-asian="italic" style:font-name-complex="Arial" style:font-size-complex="14pt"/>
    </style:style>
    <style:style style:name="P16" style:family="paragraph" style:parent-style-name="Standard">
      <style:text-properties fo:color="#00b0f0" loext:opacity="100%" style:font-name="Georgia" fo:font-size="14pt" fo:font-weight="bold" style:font-size-asian="14pt" style:font-weight-asian="bold" style:font-size-complex="14pt"/>
    </style:style>
    <style:style style:name="P17" style:family="paragraph" style:parent-style-name="Frame_20_contents">
      <style:paragraph-properties fo:text-align="center" style:justify-single-word="false"/>
      <style:text-properties fo:font-size="14pt" fo:font-style="italic" fo:background-color="#ffffff" style:font-size-asian="14pt" style:font-style-asian="italic" style:font-name-complex="Calibri1" style:font-size-complex="14pt"/>
    </style:style>
    <style:style style:name="P18" style:family="paragraph" style:parent-style-name="Standard">
      <style:paragraph-properties fo:margin-left="2in" fo:text-indent="0.5in" style:auto-text-indent="false"/>
    </style:style>
    <style:style style:name="T1" style:family="text">
      <style:text-properties fo:color="#0a0a0a" loext:opacity="100%" fo:background-color="#ffffff" loext:char-shading-value="0" style:font-name-complex="Calibri1"/>
    </style:style>
    <style:style style:name="T2" style:family="text">
      <style:text-properties style:font-name-complex="Calibri1" style:font-weight-complex="bold"/>
    </style:style>
    <style:style style:name="T3" style:family="text">
      <style:text-properties fo:color="#ffc000" loext:opacity="100%" style:font-name="Georgia" fo:font-size="18pt" fo:font-weight="bold" style:font-size-asian="18pt" style:font-weight-asian="bold" style:font-size-complex="18pt"/>
    </style:style>
    <style:style style:name="T4" style:family="text">
      <style:text-properties fo:color="#ffc000" loext:opacity="100%" style:font-name="Georgia" fo:font-size="14pt" fo:font-weight="bold" style:font-size-asian="14pt" style:font-weight-asian="bold" style:font-size-complex="14pt"/>
    </style:style>
    <style:style style:name="T5" style:family="text">
      <style:text-properties style:font-name="Georgia"/>
    </style:style>
    <style:style style:name="T6" style:family="text">
      <style:text-properties fo:color="#00b0f0" loext:opacity="100%" style:font-name="Georgia" fo:font-size="14pt" fo:font-weight="bold" style:font-size-asian="14pt" style:font-weight-asian="bold" style:font-size-complex="14pt"/>
    </style:style>
    <style:style style:name="T7" style:family="text">
      <style:text-properties style:font-name="Georgia" fo:font-style="italic" style:font-style-asian="italic" style:font-style-complex="italic"/>
    </style:style>
    <style:style style:name="T8" style:family="text">
      <style:text-properties fo:color="#00b0f0" loext:opacity="100%" style:font-name="Georgia" fo:font-size="18pt" fo:font-weight="bold" style:font-size-asian="18pt" style:font-weight-asian="bold" style:font-size-complex="18pt"/>
    </style:style>
    <style:style style:name="T9" style:family="text">
      <style:text-properties fo:color="#001d35" loext:opacity="100%" style:font-name="Georgia" fo:font-size="14pt" fo:font-style="italic" fo:background-color="#ffffff" loext:char-shading-value="0" style:font-size-asian="14pt" style:font-style-asian="italic" style:font-name-complex="Arial" style:font-size-complex="14pt"/>
    </style:style>
    <style:style style:name="T10" style:family="text">
      <style:text-properties style:font-name="Georgia" fo:font-size="14pt" fo:font-style="italic" style:font-size-asian="14pt" style:font-style-asian="italic" style:font-size-complex="14pt"/>
    </style:style>
    <style:style style:name="T11" style:family="text">
      <style:text-properties style:font-name="Georgia" fo:font-style="italic" style:font-style-asian="italic"/>
    </style:style>
    <style:style style:name="T12" style:family="text">
      <style:text-properties style:text-position="super 58%" style:font-name="Georgia"/>
    </style:style>
    <style:style style:name="T13" style:family="text">
      <style:text-properties style:font-name="Georgia" fo:font-style="italic" style:font-style-asian="italic" style:font-style-complex="italic" fo:background-color="#ffff00"/>
    </style:style>
    <style:style style:name="T14" style:family="text">
      <style:text-properties style:font-name="Georgia" fo:font-size="14pt" fo:font-weight="bold" style:font-size-asian="14pt" style:font-weight-asian="bold" style:font-size-complex="14pt"/>
    </style:style>
    <style:style style:name="T15" style:family="text">
      <style:text-properties style:font-name="Georgia" fo:font-size="14pt" fo:font-style="italic" fo:background-color="#ffffff" loext:char-shading-value="0" style:font-size-asian="14pt" style:font-style-asian="italic" style:font-name-complex="Arial" style:font-size-complex="14pt"/>
    </style:style>
    <style:style style:name="T16" style:family="text">
      <style:text-properties style:font-name="Georgia" fo:font-size="14pt" fo:font-style="normal" fo:background-color="#ffffff" loext:char-shading-value="0" style:font-size-asian="14pt" style:font-style-asian="normal" style:font-name-complex="Arial" style:font-size-complex="14pt" style:font-style-complex="normal" style:font-weight-complex="bold"/>
    </style:style>
    <style:style style:name="T17" style:family="text">
      <style:text-properties style:font-name="Georgia" fo:font-size="14pt" fo:background-color="#ffffff" loext:char-shading-value="0" style:font-size-asian="14pt" style:font-name-complex="Arial" style:font-size-complex="14pt" style:font-weight-complex="bold"/>
    </style:style>
    <style:style style:name="T18" style:family="text">
      <style:text-properties style:font-name="Georgia" fo:font-weight="normal" style:font-weight-asian="normal" style:font-weight-complex="normal"/>
    </style:style>
    <style:style style:name="T19" style:family="text">
      <style:text-properties style:font-name="Georgia" fo:font-weight="bold" style:font-weight-asian="bold"/>
    </style:style>
    <style:style style:name="T20" style:family="text">
      <style:text-properties style:font-name="Georgia" fo:font-size="11pt" style:font-size-asian="11pt" style:font-size-complex="11pt"/>
    </style:style>
    <style:style style:name="T21" style:family="text">
      <style:text-properties style:font-name="Georgia" style:font-style-complex="italic"/>
    </style:style>
    <style:style style:name="T22" style:family="text">
      <style:text-properties fo:color="#00b0f0" loext:opacity="100%" style:font-name="Georgia" fo:font-size="14pt" fo:font-style="italic" fo:font-weight="bold" style:font-size-asian="14pt" style:font-style-asian="italic" style:font-weight-asian="bold" style:font-size-complex="14pt" style:font-style-complex="italic"/>
    </style:style>
    <style:style style:name="T23" style:family="text">
      <style:text-properties style:font-name="Georgia" fo:font-size="14pt" fo:background-color="#ffffff" loext:char-shading-value="0" style:font-size-asian="14pt" style:font-name-complex="Arial" style:font-size-complex="14pt" style:font-style-complex="italic"/>
    </style:style>
    <style:style style:name="T24" style:family="text">
      <style:text-properties fo:font-family="'Segoe UI Emoji'" style:font-family-generic="swiss" style:font-pitch="variable" style:font-family-asian="'Segoe UI Emoji'" style:font-family-generic-asian="system" style:font-pitch-asian="variable" style:font-family-complex="'Segoe UI Emoji'" style:font-family-generic-complex="system" style:font-pitch-complex="variable"/>
    </style:style>
    <style:style style:name="T25" style:family="text">
      <style:text-properties style:font-name="Georgia" fo:font-size="14pt" style:font-size-asian="14pt" style:font-size-complex="14pt" style:font-weight-complex="bold"/>
    </style:style>
    <style:style style:name="T26" style:family="text">
      <style:text-properties fo:color="#00b0f0" loext:opacity="100%" style:font-name="Georgia" fo:font-size="14pt" style:font-size-asian="14pt" style:font-size-complex="14pt" style:font-weight-complex="bold"/>
    </style:style>
    <style:style style:name="T27" style:family="text">
      <style:text-properties fo:font-size="14pt" fo:background-color="#ffffff" loext:char-shading-value="0" style:font-size-asian="14pt" style:font-name-complex="Calibri1" style:font-size-complex="14pt" style:font-style-complex="italic"/>
    </style:style>
    <style:style style:name="T28" style:family="text">
      <style:text-properties fo:color="#00b0f0" loext:opacity="100%" fo:font-size="14pt" fo:font-weight="bold" fo:background-color="#ffffff" loext:char-shading-value="0" style:font-size-asian="14pt" style:font-weight-asian="bold" style:font-name-complex="Calibri1" style:font-size-complex="14pt" style:font-style-complex="italic" style:font-weight-complex="bold"/>
    </style:style>
    <style:style style:name="T29" style:family="text">
      <style:text-properties fo:color="#00b0f0" loext:opacity="100%" fo:font-size="14pt" fo:background-color="#ffffff" loext:char-shading-value="0" style:font-size-asian="14pt" style:font-name-complex="Calibri1" style:font-size-complex="14pt" style:font-style-complex="italic"/>
    </style:style>
    <style:style style:name="T30" style:family="text">
      <style:text-properties fo:font-size="14pt" fo:font-style="italic" fo:background-color="#ffffff" loext:char-shading-value="0" style:font-size-asian="14pt" style:font-style-asian="italic" style:font-name-complex="Calibri1" style:font-size-complex="14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horizontal" fo:clip="rect(0in, 0in, 0in, 0in)" draw:luminance="0%" draw:contrast="0%" draw:red="0%" draw:green="0%" draw:blue="0%" draw:gamma="100%" draw:color-inversion="false" draw:image-opacity="100%" draw:color-mode="standard" loext:decorative="false"/>
    </style:style>
    <style:style style:name="gr1" style:family="graphic" style:parent-style-name="Frame">
      <style:graphic-properties draw:stroke="none" svg:stroke-width="0.0102in" draw:stroke-linejoin="miter" draw:fill="solid" draw:fill-color="#ffffff" draw:textarea-vertical-align="top" draw:auto-grow-height="false" fo:min-height="1.5791in" fo:min-width="4.1472in" fo:padding-top="0.05in" fo:padding-bottom="0.05in" fo:padding-left="0.1in" fo:padding-right="0.1in" fo:wrap-option="wrap" loext:decorative="false" fo:margin-left="0.1244in" fo:margin-right="0.1327in" fo:margin-top="0.0484in" fo:margin-bottom="0.0602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2" style:family="graphic" style:parent-style-name="Frame">
      <style:graphic-properties draw:stroke="none" svg:stroke-width="0.0102in" draw:stroke-linejoin="miter" draw:fill="solid" draw:fill-color="#ffffff" draw:textarea-vertical-align="top" draw:auto-grow-height="false" fo:min-height="3.2236in" fo:min-width="4.1472in" fo:padding-top="0.05in" fo:padding-bottom="0.05in" fo:padding-left="0.1in" fo:padding-right="0.1in" fo:wrap-option="wrap" loext:decorative="false" fo:margin-left="0.1244in" fo:margin-right="0.1335in" fo:margin-top="0.0492in" fo:margin-bottom="0.061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102in" draw:stroke-linejoin="miter" draw:fill="none" loext:fill-use-slide-background="false" draw:textarea-vertical-align="top" draw:auto-grow-height="false" fo:min-height="2.8563in" fo:min-width="4.0283in" fo:padding-top="0.05in" fo:padding-bottom="0.05in" fo:padding-left="0.1in" fo:padding-right="0.1in" fo:wrap-option="wrap" loext:decorative="false" fo:margin-left="0.1252in" fo:margin-right="0.1252in" fo:margin-top="0.05in" fo:margin-bottom="0.0528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0102in" draw:stroke-linejoin="miter" draw:fill="none" loext:fill-use-slide-background="false" draw:textarea-vertical-align="top" draw:auto-grow-height="false" fo:min-height="5.9827in" fo:min-width="4.0283in" fo:padding-top="0.05in" fo:padding-bottom="0.05in" fo:padding-left="0.1in" fo:padding-right="0.1in" fo:wrap-option="wrap" loext:decorative="false" fo:margin-left="0.1252in" fo:margin-right="0.1252in" fo:margin-top="0.05in" fo:margin-bottom="0.0516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0102in" draw:stroke-linejoin="miter" draw:fill="none" loext:fill-use-slide-background="false" draw:textarea-vertical-align="top" draw:auto-grow-height="false" fo:min-height="1.878in" fo:min-width="4.0283in" fo:padding-top="0.05in" fo:padding-bottom="0.05in" fo:padding-left="0.1in" fo:padding-right="0.1in" fo:wrap-option="wrap" loext:decorative="false" fo:margin-left="0.1252in" fo:margin-right="0.1252in" fo:margin-top="0.0492in" fo:margin-bottom="0.052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0102in" draw:stroke-linejoin="miter" draw:fill="none" loext:fill-use-slide-background="false" draw:textarea-vertical-align="top" draw:auto-grow-height="false" fo:min-height="1.878in" fo:min-width="4.0283in" fo:padding-top="0.05in" fo:padding-bottom="0.05in" fo:padding-left="0.1in" fo:padding-right="0.1in" fo:wrap-option="wrap" loext:decorative="false" fo:margin-left="0.1252in" fo:margin-right="0.1244in" fo:margin-top="0.0492in" fo:margin-bottom="0.0528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0102in" draw:stroke-linejoin="miter" draw:fill="none" loext:fill-use-slide-background="false" draw:textarea-vertical-align="top" draw:auto-grow-height="false" fo:min-height="1.878in" fo:min-width="3.7709in" fo:padding-top="0.05in" fo:padding-bottom="0.05in" fo:padding-left="0.1in" fo:padding-right="0.1in" fo:wrap-option="wrap" loext:decorative="false" fo:margin-left="0.1244in" fo:margin-right="0.1256in" fo:margin-top="0.0492in" fo:margin-bottom="0.0528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8" style:family="graphic" style:parent-style-name="Frame">
      <style:graphic-properties draw:stroke="none" svg:stroke-width="0.0102in" draw:stroke-linejoin="miter" draw:fill="none" loext:fill-use-slide-background="false" draw:textarea-vertical-align="top" draw:auto-grow-height="false" fo:min-height="1.878in" fo:min-width="4.5244in" fo:padding-top="0.05in" fo:padding-bottom="0.05in" fo:padding-left="0.1in" fo:padding-right="0.1in" fo:wrap-option="wrap" loext:decorative="false" fo:margin-left="0.1244in" fo:margin-right="0.1252in" fo:margin-top="0.0492in" fo:margin-bottom="0.052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2">[Landing/Welcome page, background colour: lapis lazuli with specks of gold; text colour for the Welcome’ banner: yellow gold; text colour for the page text: light blue/turquoise; effects: parallax scrolling (i.e. the text </text:span><text:span text:style-name="T1">appears to move faster than the background image)</text:span></text:p>
      <text:p text:style-name="Standard" loext:marker-style-name="T2"><draw:custom-shape text:anchor-type="char" draw:z-index="12" draw:name="Text Box 2" draw:style-name="gr1" draw:text-style-name="P2" svg:width="4.3469in" svg:height="1.6787in" svg:x="1.8772in" svg:y="0.011in"><text:p text:style-name="Frame_20_contents" loext:marker-style-name="T3"><text:span text:style-name="T3">WELCOME TO TESoul’RA</text:span><text:span text:style-name="T3"/></text:p><text:p text:style-name="P1" loext:marker-style-name="T3"/><text:p text:style-name="Frame_20_contents" loext:marker-style-name="T4"><text:span text:style-name="T4">TEMPLE OF EMBODIED SOUL</text:span><text:span text:style-name="T4"/></text:p><text:p text:style-name="Frame_20_contents" loext:marker-style-name="T5"><text:span text:style-name="T4">REMEMBERANCE &amp; ALCHEMY</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1" text:anchor-type="as-char" svg:width="1.5091in" svg:height="1.5028in" draw:z-index="0"><draw:image xlink:href="Pictures/100000000000014C0000014B63F37E73.jpg" xlink:type="simple" xlink:show="embed" xlink:actuate="onLoad" draw:mime-type="image/jpeg"/></draw:frame></text:p>
      <text:p text:style-name="Standard" loext:marker-style-name="T6"><draw:frame draw:style-name="fr1" draw:name="Picture 3" text:anchor-type="as-char" svg:width="6.2681in" svg:height="4.1783in" draw:z-index="1"><draw:image xlink:href="Pictures/100000000000030000000200587A8974.png" xlink:type="simple" xlink:show="embed" xlink:actuate="onLoad" draw:mime-type="image/png"/></draw:frame></text:p>
      <text:p text:style-name="P3" loext:marker-style-name="T5"><text:span text:style-name="T5">Welcome to </text:span><text:span text:style-name="T7">TESoul’RA</text:span><text:span text:style-name="T5"> -</text:span><text:span text:style-name="T7">Temple of Embodied Soul Remembrance &amp; Alchemy</text:span><text:span text:style-name="T5"> </text:span></text:p>
      <text:p text:style-name="P3" loext:marker-style-name="T5"><text:span text:style-name="T5">Why </text:span><text:span text:style-name="T7">Temple</text:span><text:span text:style-name="T5">? The space I create in my healing sessions is a sacred container, a temple, for the restoration of your body and spirit. </text:span></text:p>
      <text:p text:style-name="P3" loext:marker-style-name="T5"><text:span text:style-name="T5">Why </text:span><text:span text:style-name="T7">Embodied Soul</text:span><text:span text:style-name="T5">? For the Soul to have truly joyous and harmonious experiences in this physical realm, it needs to be anchored into and aligned with its physical vessel – the body.</text:span></text:p>
      <text:p text:style-name="P3" loext:marker-style-name="T5"><text:span text:style-name="T5">Why </text:span><text:span text:style-name="T7">Remembrance</text:span><text:span text:style-name="T5">? The greatest awakening occurs when we remember that we are eternal beings of pure love and light having this earthly experience to expand our wisdom and compassion. This remembrance changes everything. </text:span></text:p>
      <text:p text:style-name="P3" loext:marker-style-name="T5"><text:span text:style-name="T5">Why </text:span><text:span text:style-name="T7">Alchemy</text:span><text:span text:style-name="T5">? The deepest and most transformative healing occurs when we transmute all we have suppressed, denied, judged as negative or painful back into unity and wholeness.</text:span></text:p>
      <text:p text:style-name="Standard" loext:marker-style-name="T8"><draw:custom-shape text:anchor-type="char" draw:z-index="9" draw:name="Text Box 2" draw:style-name="gr2" draw:text-style-name="P2" svg:width="4.3469in" svg:height="3.3232in" svg:x="2.3465in" svg:y="0.0862in"><text:p text:style-name="P4" loext:marker-style-name="T9"/><text:p text:style-name="P4" loext:marker-style-name="T9"/><text:p text:style-name="P4" loext:marker-style-name="T9"/><text:p text:style-name="P5" loext:marker-style-name="T9"><text:span text:style-name="T9">There are only two ways to live your life. </text:span><text:span text:style-name="T9"/></text:p><text:p text:style-name="P5" loext:marker-style-name="T10"><text:span text:style-name="T10">One is as though nothing is a miracle. </text:span><text:span text:style-name="T10"/></text:p><text:p text:style-name="P5" loext:marker-style-name="T10"><text:span text:style-name="T10">The other is as though everything is a miracle.</text:span><text:span text:style-name="T10"/></text:p><text:p text:style-name="P6" loext:marker-style-name="T5"/><text:p text:style-name="P7" loext:marker-style-name="T5"><text:span text:style-name="T5">Elbert Einstein</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8">About me</text:span><text:span text:style-name="T8"/></text:p>
      <text:p text:style-name="Standard"><draw:frame draw:style-name="fr1" draw:name="Image2" text:anchor-type="as-char" svg:width="1.9193in" svg:height="2.8783in" draw:z-index="2"><draw:image xlink:href="Pictures/10000000000001E0000002D0ED4A4C29.jpg" xlink:type="simple" xlink:show="embed" xlink:actuate="onLoad" draw:mime-type="image/jpeg"/></draw:frame></text:p>
      <text:p text:style-name="Standard"/>
      <text:p text:style-name="P3" loext:marker-style-name="T5"><text:bookmark-start text:name="_Hlk202620018"/><text:span text:style-name="T5">Welcome to my website, where you will find my healing offerings. </text:span><text:span text:style-name="T5"/></text:p>
      <text:p text:style-name="P3" loext:marker-style-name="T5"><text:soft-page-break/><text:span text:style-name="T5">I am an energy healer, channel, metaphysics teacher, and experienced mindfulness instructor. </text:span><text:span text:style-name="T5"/></text:p>
      <text:p text:style-name="P3" loext:marker-style-name="T5"><text:span text:style-name="T5">I practice healing under the name T’iam’arhat. This name was revealed to me as a higher aspect of myself in 2016, when I had a spontaneous initiation into </text:span><text:span text:style-name="T11"><office:annotation office:name="__Annotation__104_1899038244" loext:resolved="false"><dc:creator>Elena Antonova (Staff)</dc:creator><dc:date>2026-04-06T21:21:00</dc:date><meta:creator-initials>EA</meta:creator-initials><text:p>Hyperlink here to the page re Sekhem</text:p></office:annotation></text:span><text:span text:style-name="T11">Sekhem</text:span><office:annotation-end office:name="__Annotation__104_1899038244"/><text:span text:style-name="T5"> energy. <text:s/>I did not know the word at the time; it was given to me in meditation. </text:span><text:bookmark-end text:name="_Hlk202620018"/></text:p>
      <text:p text:style-name="P3" loext:marker-style-name="T5"><text:span text:style-name="T5">Even though my professional path started in science, I have always been drawn to energy healing. I tried many different energy healing approaches as a client in my 20</text:span><text:span text:style-name="T12">s</text:span><text:span text:style-name="T5"> and 30</text:span><text:span text:style-name="T12">s</text:span><text:span text:style-name="T5">. In 2013, I did my first formal energy healing training in a modality called </text:span><text:a xlink:type="simple" xlink:href="https://www.bi-aura.com/" text:style-name="Internet_20_link" text:visited-style-name="Visited_20_Internet_20_Link"><text:span text:style-name="Internet_20_link"><text:span text:style-name="T11">Bi-Aura Therapy</text:span></text:span></text:a><text:span text:style-name="T5">. I received my certification as a Level 2 </text:span><text:span text:style-name="T11">Sekhem</text:span><text:span text:style-name="T5"> energy healer in 2024 and completed Level 3 </text:span><text:span text:style-name="T11">Sekhem</text:span><text:span text:style-name="T5"> Self-Mastery course in 2025. </text:span></text:p>
      <text:p text:style-name="P3" loext:marker-style-name="T5"><text:span text:style-name="T5">Science and spirituality have never stood in opposition for me – they are different ways of exploring the mysteries of life and consciousness. In my healing sessions, I combine the scientific understanding of the function and structure of the human brain and body, metaphysical knowledge, intuitive guidance, and channelled information. My approach to energy healing rests on attuning myself to being a pure and clear channel of my Higher Self, the client’s Higher Self, and the Highest Beings of Light who assist with the sessions. <text:s/>Hence, each session is bespoke and fluid, guided by the needs of the client’s Soul. </text:span><text:span text:style-name="T5"/></text:p>
      <text:p text:style-name="P3" loext:marker-style-name="T5"><text:span text:style-name="T5">In addition to </text:span><text:span text:style-name="T7">Sekhem</text:span><text:span text:style-name="T5"> energy, I use sound and light language for healing and activations in my sessions. </text:span></text:p>
      <text:p text:style-name="P3" loext:marker-style-name="T5"><text:span text:style-name="T5">I offer both </text:span><text:span text:style-name="T5"><office:annotation office:name="__Annotation__220_1899038244" loext:resolved="false"><dc:creator>Elena Antonova (Staff)</dc:creator><dc:date>2026-04-06T21:36:00</dc:date><meta:creator-initials>EA</meta:creator-initials><text:p>Hyperlink to ‘Book an Iin-person healing session’ (see below)</text:p></office:annotation></text:span><text:span text:style-name="T13">in-person</text:span><text:span text:style-name="T5"> </text:span><office:annotation-end office:name="__Annotation__220_1899038244"/><text:span text:style-name="T5">and </text:span><text:span text:style-name="T5"><office:annotation office:name="__Annotation__226_1899038244" loext:resolved="false"><dc:creator>Elena Antonova (Staff)</dc:creator><dc:date>2026-04-07T17:47:00</dc:date><meta:creator-initials>EA</meta:creator-initials><text:p>Hyperlink to ‘Book a distant healing session’ page</text:p></office:annotation></text:span><text:span text:style-name="T7">distant</text:span><text:span text:style-name="T5"> </text:span><office:annotation-end office:name="__Annotation__226_1899038244"/><text:span text:style-name="T5">healing sessions. </text:span></text:p>
      <text:p text:style-name="P8" loext:marker-style-name="T5"/>
      <text:p text:style-name="P9" loext:marker-style-name="T6"><text:span text:style-name="T6">What is energy healing</text:span><text:span text:style-name="T6"/></text:p>
      <text:p text:style-name="Standard" loext:marker-style-name="T14"><draw:custom-shape text:anchor-type="char" draw:z-index="10" draw:name="Text Box 2" draw:style-name="gr3" draw:text-style-name="P12" svg:width="4.228in" svg:height="2.9559in" svg:x="2.4634in" svg:y="0.3339in"><text:p text:style-name="P10" loext:marker-style-name="T15"/><text:p text:style-name="P10" loext:marker-style-name="T15"/><text:p text:style-name="Frame_20_contents" loext:marker-style-name="T16"><text:span text:style-name="T15">When a living system is suffering from ill health, the remedy is found by connecting with </text:span><text:span text:style-name="Emphasis"><text:span text:style-name="T17">more of itself</text:span></text:span></text:p><text:p text:style-name="P11" loext:marker-style-name="T5"><text:span text:style-name="T5"><text:s text:c="51"/>Francisco Varela</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3" text:anchor-type="as-char" svg:width="2.2543in" svg:height="3.3819in" draw:z-index="3"><draw:image xlink:href="Pictures/10000000000001F0000002E9718A55AA.jpg" xlink:type="simple" xlink:show="embed" xlink:actuate="onLoad" draw:mime-type="image/jpeg"/></draw:frame></text:p>
      <text:p text:style-name="Standard" loext:marker-style-name="T5"><text:span text:style-name="T5">The mainstream western medicine is based on the principles and laws of Newtonian physics – one billiard ball heating another to exert an effect (pharmacotherapy is a perfect example). All energy healing modalities are based on the principles or laws of quantum physics, which <text:s/>involve fields, vibrations, and frequencies. What we perceive as ‘solid’ matter is the condensation (particles) of the energy fields (waves) that vibrate at different frequencies (speed). EVERYTHING in the Universe, ABSOLUTELY EVERYTHING, vibrates. This is basic physics, not just a New Age notion. <text:s/></text:span><text:span text:style-name="T5"/></text:p>
      <text:p text:style-name="Standard" loext:marker-style-name="T5"><text:span text:style-name="T5">Many things can occur within an energy healing session. However, the main principle rests on a healer serving as a conduit for and an amplifier of the higher energy frequencies, thus ‘lifting’ up the client’s energy field to a higher frequency, similar to how one tuning fork creates resonance in another tuning fork. The healer would also clear old, stagnant and distorted energies, allowing the space for the new pure energies to come in as well as facilitating alignment and integration of these energies in the physical and subtle bodies, including emotional, mental, and spiritual. <text:s/></text:span><text:span text:style-name="T5"/></text:p>
      <text:p text:style-name="Standard" loext:marker-style-name="T5"><text:span text:style-name="T5">Clearing, shifting to higher energy frequencies, and realigning the client’s physical and subtle bodies potentise the client’s energy field, ‘reminding’ it of the coherent vibrational state that is most optimal for health and well-being. <text:s text:c="2"/>This in turn can lead to the resolution of health issues, both physical and psychological. <text:s/></text:span><text:span text:style-name="T5"/></text:p>
      <text:p text:style-name="Standard" loext:marker-style-name="T5"><text:span text:style-name="T5">Both in-person and distant healing sessions can be equally effective. In a distant energy healing session, the healer and client are connected through </text:span><text:span text:style-name="Strong_20_Emphasis"><text:span text:style-name="T18">conscious intention and energetic awareness</text:span></text:span><text:span text:style-name="T5">. This connection creates an </text:span><text:span text:style-name="Strong_20_Emphasis"><text:span text:style-name="T18">informational link</text:span></text:span><text:span text:style-name="T19">,</text:span><text:span text:style-name="T5"> allowing the healer to "tune in" to the client’s energy field, even if they’re on the other side of the world. The healer can then sense imbalances and facilitate shifts, much like sending a signal across a wireless network, except the network in this case is the conscious </text:span><text:span text:style-name="Strong_20_Emphasis"><text:span text:style-name="T18">energy field</text:span></text:span><text:span text:style-name="T5">. Nothing is lost in terms of efficacy, and in some cases even gained, as the healer is able to tune in even deeper without being distracted by the physically of a client’s body. Having said that, whenever practically possible, it is advantageous to have at least your first session with me in person as I am able to use more tools. </text:span></text:p>
      <text:p text:style-name="P13" loext:marker-style-name="T20"><draw:custom-shape text:anchor-type="char" draw:z-index="11" draw:name="Text Box 2" draw:style-name="gr4" draw:text-style-name="P12" svg:width="4.228in" svg:height="6.0823in" svg:x="2.4925in" svg:y="0.3429in"><text:p text:style-name="P14" loext:marker-style-name="T5"><text:span text:style-name="T11">Sekhem</text:span><text:span text:style-name="T5"> is an ancient Egyptian word for the universal vital life-force energy. Since its literal translation is “power” or “might”, it is often referred to as “Power of Powers”. In ancient Egyptian cosmology it is connected to and protected by Sekhmet – a Lion-headed Goddess who transmutes ego-negativity and distorted energies back into the purity of one’s Essence Being as Divine Light, so we can rise as the Phenix, reborn and renewed, to actualise our highest Soul potential. Sekhmet’s healing returns us to the state of personal empowerment, Soul sovereignty, and spiritual warrior, whose weapon is fearless unconditional love and compassion. </text:span></text:p><text:p text:style-name="P14" loext:marker-style-name="T21"><text:span text:style-name="T11">Sekhem </text:span><text:span text:style-name="T21">energy</text:span><text:span text:style-name="T11"> </text:span><text:span text:style-name="T21">is associated with turquoise colour. In ancient Egypt, turquoise (</text:span><text:span text:style-name="T7">mefkat</text:span><text:span text:style-name="T21">) was one of the most prized gemstones. Pharaohs and priests wore turquoise to ensure divine protection and spiritual power, believing it made them invulnerable to harm. The blue-green hue was seen as a reflection of the heavens and the primordial waters of creation, symbolising eternal life and rebirth.</text:span></text:p><text:p text:style-name="P14" loext:marker-style-name="T21"><text:span text:style-name="T21"><text:s/>Energetically, turquoise is the synergy of blue (transformation) and green (healing) energy frequencies. Like water, it washes away energetic blockages and toxins, whilst calming the nervous system and bringing a state of serene awareness. <text:s/>The turquoise frequency perfectly mirrors the balance between the heart and the mind.</text:span><text:span text:style-name="T21"/></text:p><text:p text:style-name="P14" loext:marker-style-name="T21"><text:span text:style-name="T21">While turquoise is the most common expression of </text:span><text:span text:style-name="T11">Sekhem</text:span><text:span text:style-name="T21"> energy, it can also be experienced as a swirling electric blue, yellow golden plasma or diamond white rainbow light, depending on the energetic state of the practitioner and the needs of the client’s physical and subtle bodies.</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6">What is </text:span><text:span text:style-name="T22">Sekhem</text:span><text:span text:style-name="T6"> energy </text:span></text:p>
      <text:p text:style-name="Standard" loext:marker-style-name="T5"><draw:frame draw:style-name="fr1" draw:name="Picture 4" text:anchor-type="as-char" svg:width="2.3583in" svg:height="3.5425in" draw:z-index="4"><draw:image xlink:href="Pictures/10000000000001D6000002C2CE78E37F.jpg" xlink:type="simple" xlink:show="embed" xlink:actuate="onLoad" draw:mime-type="image/jpeg"/></draw:frame></text:p>
      <text:p text:style-name="P8" loext:marker-style-name="T5"/>
      <text:p text:style-name="Standard" loext:marker-style-name="T5"><text:span text:style-name="T5"><text:s/></text:span><text:span text:style-name="T5"/></text:p>
      <text:p text:style-name="P8" loext:marker-style-name="T5"/>
      <text:p text:style-name="P9" loext:marker-style-name="T5"><text:span text:style-name="T5">[Please put these as rectangles side by side, if there is space on the page; if not, then one under the other]</text:span><text:span text:style-name="T5"/></text:p>
      <text:p text:style-name="P8" loext:marker-style-name="T5"/>
      <text:p text:style-name="Standard" loext:marker-style-name="T5"><draw:custom-shape text:anchor-type="char" draw:z-index="13" draw:name="Text Box 2" draw:style-name="gr5" draw:text-style-name="P12" svg:width="4.228in" svg:height="1.9776in" svg:x="2.4846in" svg:y="0.7457in"><text:p text:style-name="P10" loext:marker-style-name="T15"/><text:p text:style-name="P15" loext:marker-style-name="T15"/><text:p text:style-name="P11" loext:marker-style-name="T23"><text:span text:style-name="T23">Book an </text:span><text:span text:style-name="T15">in-person</text:span><text:span text:style-name="T23"> healing session</text:span></text:p><text:p text:style-name="P11" loext:marker-style-name="T21"><text:span text:style-name="T23">(1,5 hours; £120)</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Picture 2" text:anchor-type="as-char" svg:width="1.9925in" svg:height="2.989in" draw:z-index="5"><draw:image xlink:href="Pictures/10000000000001BB0000029847757E15.jpg" xlink:type="simple" xlink:show="embed" xlink:actuate="onLoad" draw:mime-type="image/jpeg"/></draw:frame></text:p>
      <text:p text:style-name="P8" loext:marker-style-name="T5"/>
      <text:p text:style-name="Standard" loext:marker-style-name="T5"><draw:custom-shape text:anchor-type="char" draw:z-index="14" draw:name="Text Box 2" draw:style-name="gr6" draw:text-style-name="P12" svg:width="4.228in" svg:height="1.9776in" svg:x="2.5453in" svg:y="0.6689in"><text:p text:style-name="P10" loext:marker-style-name="T15"/><text:p text:style-name="P15" loext:marker-style-name="T15"/><text:p text:style-name="P11" loext:marker-style-name="T23"><text:span text:style-name="T23">Book a </text:span><text:span text:style-name="T15">distant</text:span><text:span text:style-name="T23"> healing session</text:span></text:p><text:p text:style-name="P11" loext:marker-style-name="T21"><text:span text:style-name="T23">(1 hour; £80)</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4" text:anchor-type="as-char" svg:width="2.0374in" svg:height="3.0563in" draw:z-index="6"><draw:image xlink:href="Pictures/10000000000001C4000002A662E2E23F.jpg" xlink:type="simple" xlink:show="embed" xlink:actuate="onLoad" draw:mime-type="image/jpeg"/></draw:frame></text:p>
      <text:p text:style-name="P8" loext:marker-style-name="T5"/>
      <text:p text:style-name="P9" loext:marker-style-name="T5"><text:span text:style-name="T5">[Carousel with testimonials; to be added when I get them </text:span><text:span text:style-name="T24">😊</text:span><text:span text:style-name="T5">]</text:span></text:p>
      <text:p text:style-name="P16" loext:marker-style-name="T6"/>
      <text:p text:style-name="P9" loext:marker-style-name="T25"><text:span text:style-name="T25">[Contact</text:span><text:span text:style-name="T26"> </text:span><text:span text:style-name="T25">page]</text:span></text:p>
      <text:p text:style-name="Standard" loext:marker-style-name="T5"><draw:custom-shape text:anchor-type="char" draw:z-index="16" draw:name="Text Box 2" draw:style-name="gr7" draw:text-style-name="P12" svg:width="3.9705in" svg:height="1.9776in" svg:x="2.6626in" svg:y="0.0083in"><text:p text:style-name="Frame_20_contents" loext:marker-style-name="T27"><text:span text:style-name="T27">[</text:span><text:span text:style-name="T28">Contact Me</text:span><text:span text:style-name="T29"> </text:span><text:span text:style-name="T27">form here with ‘Name’, ‘Email Address’, ‘Phone Number (optional)’, and ‘Message’ text boxes, with the ‘Submit’ button underneath]</text:span></text:p><text:p text:style-name="P17" loext:marker-style-name="T30"/><text:p text:style-name="Frame_20_contents" loext:marker-style-name="T21"/><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5" text:anchor-type="as-char" svg:width="2.3957in" svg:height="3.5929in" draw:z-index="7"><draw:image xlink:href="Pictures/10000000000001E0000002D04D6086E9.jpg" xlink:type="simple" xlink:show="embed" xlink:actuate="onLoad" draw:mime-type="image/jpeg"/></draw:frame></text:p>
      <text:p text:style-name="P8" loext:marker-style-name="T5"/>
      <text:p text:style-name="P8" loext:marker-style-name="T5"><draw:custom-shape text:anchor-type="char" draw:z-index="15" draw:name="Text Box 2" draw:style-name="gr8" draw:text-style-name="P12" svg:width="4.724in" svg:height="1.9776in" svg:x="2.0583in" svg:y="0.0071in"><text:p text:style-name="Frame_20_contents" loext:marker-style-name="T29"><text:span text:style-name="T28">Contact Info</text:span><text:span text:style-name="T29"> </text:span></text:p><text:p text:style-name="Frame_20_contents" loext:marker-style-name="T27"><text:span text:style-name="T27">WhatsApp: +44 77 888 47 113</text:span><text:span text:style-name="T27"/></text:p><text:p text:style-name="Frame_20_contents" loext:marker-style-name="T27"><text:span text:style-name="T27">Email: </text:span><text:a xlink:type="simple" xlink:href="mailto:contact@tesoulra.com" text:style-name="Internet_20_link" text:visited-style-name="Visited_20_Internet_20_Link"><text:span text:style-name="Internet_20_link"><text:span text:style-name="T27">contact@tesoulra.com</text:span></text:span></text:a></text:p><text:p text:style-name="Frame_20_contents" loext:marker-style-name="T27"><text:span text:style-name="T27">[FB icon] [Instagram icon]</text:span><text:span text:style-name="T27"/></text:p><text:p text:style-name="P17" loext:marker-style-name="T30"/><text:p text:style-name="Frame_20_contents" loext:marker-style-name="T21"/><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 loext:marker-style-name="T5"/>
      <text:p text:style-name="P8" loext:marker-style-name="T5"/>
      <text:p text:style-name="P8" loext:marker-style-name="T5"/>
      <text:p text:style-name="P8" loext:marker-style-name="T5"/>
      <text:p text:style-name="P8" loext:marker-style-name="T5"/>
      <text:p text:style-name="P8" loext:marker-style-name="T5"/>
      <text:p text:style-name="P8" loext:marker-style-name="T5"/>
      <text:p text:style-name="P8" loext:marker-style-name="T5"/>
      <text:p text:style-name="P18" loext:marker-style-name="T5"><draw:frame draw:style-name="fr1" draw:name="Image6" text:anchor-type="as-char" svg:width="1.5091in" svg:height="1.5028in" draw:z-index="8"><draw:image xlink:href="Pictures/100000000000014C0000014B63F37E73.jpg" xlink:type="simple" xlink:show="embed" xlink:actuate="onLoad" draw:mime-type="image/jpeg"/></draw:frame></text:p>
      <text:p text:style-name="P8" loext:marker-style-name="T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loext:linked-style-name="Balloon_20_Text">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Georgia" fo:font-family="Georgia" style:font-family-generic="roman" style:font-pitch="variable" fo:font-style="italic" style:font-style-asian="italic"/>
    </style:style>
    <style:style style:name="ListLabel_20_2" style:display-name="ListLabel 2" style:family="text">
      <style:text-properties fo:font-size="14pt" fo:background-color="#ffffff" style:font-size-asian="14pt" style:font-name-complex="Calibri1" style:font-family-complex="Calibri" style:font-family-generic-complex="system" style:font-pitch-complex="variable" style:font-size-complex="14pt"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Elena Antonova (Staff)</meta:initial-creator>
    <dc:creator>Elena Antonova (Staff)</dc:creator>
    <meta:editing-cycles>245</meta:editing-cycles>
    <meta:creation-date>2026-04-06T19:37:00</meta:creation-date>
    <dc:date>2026-04-07T18:59:00</dc:date>
    <meta:editing-duration>PT3H40M</meta:editing-duration>
    <meta:generator>LibreOffice/25.8.6.2$Linux_X86_64 LibreOffice_project/a46b460d1686bb49c718d2ef5f88b83ff2dc4981</meta:generator>
    <meta:document-statistic meta:table-count="0" meta:image-count="9" meta:object-count="0" meta:page-count="7" meta:paragraph-count="55" meta:word-count="1210" meta:character-count="7570" meta:non-whitespace-character-count="6320"/>
    <meta:user-defined meta:name="AppVersion">16.0000</meta:user-defined>
    <meta:user-defined meta:name="ContentTypeId">0x010100E66648DF556D5E429A7F43690AB7FC26</meta:user-defined>
    <meta:template xlink:type="simple" xlink:actuate="onRequest" xlink:title="Normal.dotm" xlink:href=""/>
  </office:meta>
</office:document-meta>
</file>